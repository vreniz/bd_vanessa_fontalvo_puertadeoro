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3.953cm"/>
    </style:style>
    <style:style style:name="co6" style:family="table-column">
      <style:table-column-properties fo:break-before="auto" style:column-width="3.21cm"/>
    </style:style>
    <style:style style:name="co7" style:family="table-column">
      <style:table-column-properties fo:break-before="auto" style:column-width="6.17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eco_5f_cities">
      <style:table-properties table:display="true" style:writing-mode="lr-tb"/>
    </style:style>
    <style:style style:name="ta2" style:family="table" style:master-page-name="PageStyle_5f_eco_5f_categories">
      <style:table-properties table:display="true" style:writing-mode="lr-tb"/>
    </style:style>
    <style:style style:name="ta3" style:family="table" style:master-page-name="PageStyle_5f_eco_5f_clients">
      <style:table-properties table:display="true" style:writing-mode="lr-tb"/>
    </style:style>
    <style:style style:name="ta4" style:family="table" style:master-page-name="PageStyle_5f_eco_5f_distribution_5f_centers">
      <style:table-properties table:display="true" style:writing-mode="lr-tb"/>
    </style:style>
    <style:style style:name="ta5" style:family="table" style:master-page-name="PageStyle_5f_eco_5f_products">
      <style:table-properties table:display="true" style:writing-mode="lr-tb"/>
    </style:style>
    <style:style style:name="ta6" style:family="table" style:master-page-name="PageStyle_5f_eco_5f_orders">
      <style:table-properties table:display="true" style:writing-mode="lr-tb"/>
    </style:style>
    <style:style style:name="ta7" style:family="table" style:master-page-name="PageStyle_5f_eco_5f_order_5f_details">
      <style:table-properties table:display="true" style:writing-mode="lr-tb"/>
    </style:style>
    <style:style style:name="ta8" style:family="table" style:master-page-name="PageStyle_5f_eco_5f_inventory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e7d46" style:diagonal-bl-tr="none" style:diagonal-tl-br="none" style:text-align-source="fix" style:repeat-content="false" fo:wrap-option="no-wrap" fo:border="0.74pt solid #cbe5d2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cbe5d2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co_citi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ity_id</text:p>
          </table:table-cell>
          <table:table-cell table:style-name="ce1" office:value-type="string" calcext:value-type="string">
            <text:p>city_name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rranquilla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ogotá</text:p>
          </table:table-cell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caramanga</text:p>
          </table:table-cell>
          <table:table-cell table:number-columns-repeated="102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ali</text:p>
          </table:table-cell>
          <table:table-cell table:number-columns-repeated="10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artagena</text:p>
          </table:table-cell>
          <table:table-cell table:number-columns-repeated="102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úcuta</text:p>
          </table:table-cell>
          <table:table-cell table:number-columns-repeated="102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anizales</text:p>
          </table:table-cell>
          <table:table-cell table:number-columns-repeated="102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edellín</text:p>
          </table:table-cell>
          <table:table-cell table:number-columns-repeated="102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ereira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_categories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ategory_id</text:p>
          </table:table-cell>
          <table:table-cell table:style-name="ce1" office:value-type="string" calcext:value-type="string">
            <text:p>category_name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airy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ruits</text:p>
          </table:table-cell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rains</text:p>
          </table:table-cell>
          <table:table-cell table:number-columns-repeated="102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eat</text:p>
          </table:table-cell>
          <table:table-cell table:number-columns-repeated="10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ils</text:p>
          </table:table-cell>
          <table:table-cell table:number-columns-repeated="102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Vegetables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_clients" table:style-name="ta3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client_id</text:p>
          </table:table-cell>
          <table:table-cell table:style-name="ce1" office:value-type="string" calcext:value-type="string">
            <text:p>client_name</text:p>
          </table:table-cell>
          <table:table-cell table:style-name="ce1" office:value-type="string" calcext:value-type="string">
            <text:p>city_id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coStor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oodPlus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reshMart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reenBu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rketOn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iniShop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QuickFood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etailCo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uperMa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_distribution_centers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center_id</text:p>
          </table:table-cell>
          <table:table-cell table:style-name="ce1" office:value-type="string" calcext:value-type="string">
            <text:p>center_name</text:p>
          </table:table-cell>
          <table:table-cell table:style-name="ce1" office:value-type="string" calcext:value-type="string">
            <text:p>city_id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nter Nort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enter West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oast D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ffee DC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ast Hub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outh Hub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_products" table:style-name="ta5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product_id</text:p>
          </table:table-cell>
          <table:table-cell table:style-name="ce1" office:value-type="string" calcext:value-type="string">
            <text:p>product_name</text:p>
          </table:table-cell>
          <table:table-cell table:style-name="ce1" office:value-type="string" calcext:value-type="string">
            <text:p>category_id</text:p>
          </table:table-cell>
          <table:table-cell table:style-name="ce1" office:value-type="string" calcext:value-type="string">
            <text:p>unit_pric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ceberg Lettuc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1" calcext:value-type="float">
            <text:p>1,1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nan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2" calcext:value-type="float">
            <text:p>1,2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omat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8" calcext:value-type="float">
            <text:p>1,8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ice 1k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ast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3" calcext:value-type="float">
            <text:p>2,3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Gala Appl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5" calcext:value-type="float">
            <text:p>2,5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hole Milk 1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8" calcext:value-type="float">
            <text:p>3,8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Eggs x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2" calcext:value-type="float">
            <text:p>4,2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hicken Breas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.5" calcext:value-type="float">
            <text:p>6,5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Extra Virgin Olive Oi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.9" calcext:value-type="float">
            <text:p>8,9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_orders" table:style-name="ta6">
        <office:forms form:automatic-focus="false" form:apply-design-mode="false"/>
        <table:table-column table:style-name="co1" table:number-columns-repeated="2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order_id</text:p>
          </table:table-cell>
          <table:table-cell table:style-name="ce1" office:value-type="string" calcext:value-type="string">
            <text:p>client_id</text:p>
          </table:table-cell>
          <table:table-cell table:style-name="ce1" office:value-type="string" calcext:value-type="string">
            <text:p>order_da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100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2026-05-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100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2026-05-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100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026-05-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100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026-05-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100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2026-05-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100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2026-05-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100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2026-05-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100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2026-05-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10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026-05-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1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026-05-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10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026-05-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10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026-05-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101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2026-05-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101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2026-05-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10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026-05-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10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026-05-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10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026-05-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10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026-05-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101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2026-05-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102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2026-05-19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_order_details" table:style-name="ta7">
        <office:forms form:automatic-focus="false" form:apply-design-mode="false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detail_id</text:p>
          </table:table-cell>
          <table:table-cell table:style-name="ce1" office:value-type="string" calcext:value-type="string">
            <text:p>order_id</text:p>
          </table:table-cell>
          <table:table-cell table:style-name="ce1" office:value-type="string" calcext:value-type="string">
            <text:p>product_id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_price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100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5" calcext:value-type="float">
            <text:p>2,5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100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.5" calcext:value-type="float">
            <text:p>2,5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100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.2" calcext:value-type="float">
            <text:p>1,2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100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.2" calcext:value-type="float">
            <text:p>1,2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100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.8" calcext:value-type="float">
            <text:p>3,8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O100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.8" calcext:value-type="float">
            <text:p>3,8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O100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.5" calcext:value-type="float">
            <text:p>6,5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O100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.5" calcext:value-type="float">
            <text:p>6,5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O100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O10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O10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.9" calcext:value-type="float">
            <text:p>8,9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O10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.9" calcext:value-type="float">
            <text:p>8,9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O101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.2" calcext:value-type="float">
            <text:p>4,2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O101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.2" calcext:value-type="float">
            <text:p>4,2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O10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.8" calcext:value-type="float">
            <text:p>1,8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O1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.8" calcext:value-type="float">
            <text:p>1,8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O10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.1" calcext:value-type="float">
            <text:p>1,1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O10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.1" calcext:value-type="float">
            <text:p>1,1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O101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.3" calcext:value-type="float">
            <text:p>2,3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O10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.3" calcext:value-type="float">
            <text:p>2,3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_inventory" table:style-name="ta8">
        <office:forms form:automatic-focus="false" form:apply-design-mode="false"/>
        <table:table-column table:style-name="co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inventory_id</text:p>
          </table:table-cell>
          <table:table-cell table:style-name="ce1" office:value-type="string" calcext:value-type="string">
            <text:p>product_id</text:p>
          </table:table-cell>
          <table:table-cell table:style-name="ce1" office:value-type="string" calcext:value-type="string">
            <text:p>center_id</text:p>
          </table:table-cell>
          <table:table-cell table:style-name="ce1" office:value-type="string" calcext:value-type="string">
            <text:p>stock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165" calcext:value-type="float">
            <text:p>165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2" calcext:value-type="float">
            <text:p>182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127" calcext:value-type="float">
            <text:p>127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9" table:style-name="ta9">
        <office:forms form:automatic-focus="false" form:apply-design-mode="false"/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currency-style style:name="N121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1P1" style:volatile="true">
      <number:text> </number:text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1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07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7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09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0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number-style style:name="N114P0" style:volatile="true">
      <number:number number:decimal-places="0" number:min-decimal-places="0" number:min-integer-digits="1" number:grouping="true"/>
      <number:text> </number:text>
    </number:number-style>
    <number:number-style style:name="N11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</number:text>
    </number:number-style>
    <number:number-style style:name="N11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19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9P1" style:volatile="true">
      <number:text> </number:text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19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eco_5f_orders" style:display-name="PageStyle_eco_order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co_5f_inventory" style:display-name="PageStyle_eco_inventory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co_5f_categories" style:display-name="PageStyle_eco_categori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co_5f_clients" style:display-name="PageStyle_eco_client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co_5f_cities" style:display-name="PageStyle_eco_citi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co_5f_products" style:display-name="PageStyle_eco_product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co_5f_distribution_5f_centers" style:display-name="PageStyle_eco_distribution_center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co_5f_order_5f_details" style:display-name="PageStyle_eco_order_detail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6-07-06T21:06:35</meta:creation-date>
    <dc:date>2026-07-06T18:43:22.794938186</dc:date>
    <meta:generator>LibreOffice/7.3.7.2$Linux_X86_64 LibreOffice_project/30$Build-2</meta:generator>
    <meta:editing-duration>PT9M40S</meta:editing-duration>
    <meta:editing-cycles>1</meta:editing-cycles>
    <meta:document-statistic meta:table-count="9" meta:cell-count="341" meta:object-count="0"/>
    <meta:user-defined meta:name="AppVersion">3.1</meta:user-defined>
  </office:meta>
</office:document-meta>
</file>